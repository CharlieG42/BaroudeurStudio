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mimetype" manifest:media-type="application/vnd.oasis.opendocument.presentation"/>
  <manifest:file-entry manifest:full-path="META-INF/manifest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svg="urn:oasis:names:tc:opendocument:xmlns:svg-compatible:1.0">
  <office:scripts/>
  <office:font-face-decls>
    <style:font-face style:name="Liberation Sans" svg:font-family="Liberation Sans"/>
  </office:font-face-decls>
  <office:automatic-styles>
    <style:style style:name="P1" style:family="paragraph" style:parent-style-name="Standard">
      <style:text-properties style:font-name="Liberation Sans" style:font-size="24pt" fo:font-weight="bold" style:color="#f5a665"/>
    </style:style>
    <style:style style:name="P2" style:family="paragraph" style:parent-style-name="Standard">
      <style:text-properties style:font-name="Liberation Sans" style:font-size="18pt" fo:font-weight="bold" style:color="#A67352"/>
    </style:style>
    <style:style style:name="P3" style:family="paragraph" style:parent-style-name="Standard">
      <style:text-properties style:font-name="Liberation Sans" style:font-size="16pt" style:font-style="italic" style:color="#666666"/>
    </style:style>
    <style:style style:name="P4" style:family="paragraph" style:parent-style-name="Standard">
      <style:text-properties style:font-name="Liberation Sans" style:font-size="14pt" style:color="#000000"/>
    </style:style>
    <style:style style:name="P5" style:family="paragraph" style:parent-style-name="Standard">
      <style:text-properties style:font-name="Liberation Sans" style:font-size="12pt" style:color="#666666"/>
    </style:style>
    <style:style style:name="DP1" style:family="drawing-page">
      <style:drawing-page-properties draw:page-layout-name="AL1" style:background-color="#d7b895"/>
    </style:style>
    <style:style style:name="graphic" style:family="graphic">
      <style:graphic-properties svg:stroke-color="#000000" draw:fill="solid" draw:fill-color="#ffffff" fo:wrap-option="wrap" draw:textarea-horizontal-align="center" draw:textarea-vertical-align="center"/>
    </style:style>
  </office:automatic-styles>
  <office:body>
    <office:presentation>
      <draw:page draw:name="page_0" draw:style-name="DP1" draw:master-page-name="Default">
        <draw:frame svg:x="1cm" svg:y="4cm" svg:width="26cm" svg:height="2cm">
          <draw:text-box>
            <text:p text:style-name="P1">Les Baroudeurs</text:p>
          </draw:text-box>
        </draw:frame>
        <draw:frame svg:x="1cm" svg:y="7cm" svg:width="26cm" svg:height="1cm">
          <draw:text-box>
            <text:p text:style-name="P2">test trek</text:p>
          </draw:text-box>
        </draw:frame>
        <draw:frame svg:x="1cm" svg:y="9cm" svg:width="26cm" svg:height="1cm">
          <draw:text-box>
            <text:p text:style-name="P3">Belledonne, France</text:p>
          </draw:text-box>
        </draw:frame>
        <draw:frame svg:x="1cm" svg:y="11cm" svg:width="26cm" svg:height="1cm">
          <draw:text-box>
            <text:p text:style-name="P3">Un recit de voyage</text:p>
          </draw:text-box>
        </draw:frame>
      </draw:page>
      <draw:page draw:name="page_1" draw:style-name="DP1" draw:master-page-name="Default">
        <draw:frame svg:x="1cm" svg:y="2cm" svg:width="26cm" svg:height="1cm">
          <draw:text-box>
            <text:p text:style-name="P2">test trek</text:p>
          </draw:text-box>
        </draw:frame>
        <draw:frame svg:x="1cm" svg:y="4cm" svg:width="26cm" svg:height="10cm">
          <draw:text-box>
            <text:p text:style-name="P4">Du: 2026-07-08</text:p>
            <text:p text:style-name="P4">Au: 2026-07-09</text:p>
            <text:p text:style-name="P4">Duree: 2 jour(s)</text:p>
            <text:p text:style-name="P4">Compagnons: Seul(e)</text:p>
          </draw:text-box>
        </draw:frame>
      </draw:page>
      <draw:page draw:name="page_2" draw:style-name="DP1" draw:master-page-name="Default">
        <draw:frame svg:x="1cm" svg:y="1cm" svg:width="26cm" svg:height="1cm">
          <draw:text-box>
            <text:p text:style-name="P2">mercredi 8 juillet 2026</text:p>
            <text:p text:style-name="P3">Prapoutel -&gt; pleynet</text:p>
          </draw:text-box>
        </draw:frame>
        <draw:frame svg:x="1cm" svg:y="4cm" svg:width="26cm" svg:height="10cm">
          <draw:text-box>
            <text:p text:style-name="P4">Recit du jour: ceci est un test</text:p>
            <text:p text:style-name="P4">Distance: N/A km</text:p>
            <text:p text:style-name="P4">Meteo: </text:p>
            <text:p text:style-name="P4">Emotions: </text:p>
            <text:p text:style-name="P4">Difficultes: </text:p>
            <text:p text:style-name="P4">Decouvertes: </text:p>
          </draw:text-box>
        </draw:frame>
      </draw:page>
      <draw:page draw:name="page_3" draw:style-name="DP1" draw:master-page-name="Default">
        <draw:frame svg:x="1cm" svg:y="1cm" svg:width="26cm" svg:height="1cm">
          <draw:text-box>
            <text:p text:style-name="P2">jeudi 9 juillet 2026</text:p>
            <text:p text:style-name="P3">pleynet -&gt; prapoutel</text:p>
          </draw:text-box>
        </draw:frame>
        <draw:frame svg:x="1cm" svg:y="4cm" svg:width="26cm" svg:height="10cm">
          <draw:text-box>
            <text:p text:style-name="P4">Distance: N/A km</text:p>
            <text:p text:style-name="P4">Meteo: </text:p>
            <text:p text:style-name="P4">Emotions: </text:p>
            <text:p text:style-name="P4">Difficultes: </text:p>
            <text:p text:style-name="P4">Decouvertes: </text:p>
          </draw:text-box>
        </draw:frame>
      </draw:page>
      <draw:page draw:name="page_4" draw:style-name="DP1" draw:master-page-name="Default">
        <draw:frame svg:x="1cm" svg:y="8cm" svg:width="26cm" svg:height="4cm">
          <draw:text-box>
            <text:p text:style-name="P1">Fin du recit</text:p>
            <text:p text:style-name="P2">test trek</text:p>
            <text:p text:style-name="P3">Merci d'avoir vecu cette aventure !</text:p>
            <text:p text:style-name="P5">Les Baroudeurs - 2026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xmlns:svg="urn:oasis:names:tc:opendocument:xmlns:svg-compatible:1.0">
  <office:styles>
    <!-- Mise en page des pages - ORIENTATION PORTRAIT OBLIGATOIRE -->
    <draw:page-layout draw:name="AL1">
      <draw:page-layout-properties draw:page-width="21cm" draw:page-height="28cm" draw:print-orientation="portrait"/>
    </draw:page-layout>
    <style:page-layout style:name="PM1">
      <style:page-layout-properties fo:page-width="21cm" fo:page-height="28cm" style:print-orientation="portrait"/>
    </style:page-layout>
    <!-- Style de la page de dessin -->
    <style:style style:name="DP1" style:family="drawing-page">
      <style:drawing-page-properties draw:page-layout-name="AL1" draw:background-color="#d7b895"/>
    </style:style>
    <!-- Styles de paragraphe -->
    <style:style style:name="P1" style:family="paragraph" style:parent-style-name="Standard">
      <style:text-properties style:font-name="Liberation Sans" style:font-size="24pt" fo:font-weight="bold" style:color="#f5a665"/>
    </style:style>
    <style:style style:name="P2" style:family="paragraph" style:parent-style-name="Standard">
      <style:text-properties style:font-name="Liberation Sans" style:font-size="18pt" fo:font-weight="bold" style:color="#A67352"/>
    </style:style>
    <style:style style:name="P3" style:family="paragraph" style:parent-style-name="Standard">
      <style:text-properties style:font-name="Liberation Sans" style:font-size="16pt" style:font-style="italic" style:color="#666666"/>
    </style:style>
    <style:style style:name="P4" style:family="paragraph" style:parent-style-name="Standard">
      <style:text-properties style:font-name="Liberation Sans" style:font-size="14pt" style:color="#000000"/>
    </style:style>
    <style:style style:name="P5" style:family="paragraph" style:parent-style-name="Standard">
      <style:text-properties style:font-name="Liberation Sans" style:font-size="12pt" style:color="#666666"/>
    </style:style>
    <!-- Style pour les images -->
    <style:style style:name="graphic" style:family="graphic">
      <style:graphic-properties svg:stroke-color="#000000" draw:fill="solid" draw:fill-color="#ffffff" fo:wrap-option="wrap" draw:textarea-horizontal-align="center" draw:textarea-vertical-align="center"/>
    </style:style>
  </office:styles>
  <office:automatic-styles/>
  <office:master-styles>
    <!-- Page ma�tre par d�faut utilisant la mise en page PM1 (portrait) -->
    <style:master-page style:name="Default" style:page-layout-name="PM1">
      <draw:page draw:name="Default" draw:style-name="DP1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initial-creator>Baroudeur Studio</meta:initial-creator>
    <dc:creator>Les Baroudeurs</dc:creator>
    <meta:creation-date>2026-07-24T07:39:25</meta:creation-date>
    <dc:date>2026-07-24T07:39:25</dc:date>
    <dc:title>test trek</dc:title>
    <dc:subject>Recit de voyage - Les Baroudeurs</dc:subject>
    <dc:description>Carnets de trek illustres pour la collection Les Baroudeurs</dc:description>
  </office:meta>
</office:document-meta>
</file>